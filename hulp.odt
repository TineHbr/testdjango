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icrosoft Windows [Version 10.0.26200.8037] (c) Microsoft Corporation. Alle rechten voorbehouden.</text:p>
      <text:p text:style-name="Text_20_body">C:\Users\tineh&gt;cd desktop</text:p>
      <text:p text:style-name="Text_20_body">C:\Users\tineh\Desktop&gt;mkdir djangoproject_new</text:p>
      <text:p text:style-name="Text_20_body">C:\Users\tineh\Desktop&gt;cd djangoproject_new</text:p>
      <text:p text:style-name="Text_20_body">C:\Users\tineh\Desktop\djangoproject_new&gt;py -m venv django_new_env</text:p>
      <text:p text:style-name="Text_20_body">C:\Users\tineh\Desktop\djangoproject_new&gt;django_new_env\Scripts\activate</text:p>
      <text:p text:style-name="Text_20_body">(django_new_env) C:\Users\tineh\Desktop\djangoproject_new&gt;deactivate C:\Users\tineh\Desktop\djangoproject_new&gt;type NUL requirements.txt Het systeem kan het opgegeven bestand niet vinden. Error occurred while processing: requirements.txt.</text:p>
      <text:p text:style-name="Text_20_body">C:\Users\tineh\Desktop\djangoproject_new&gt;type NUL &gt; requirements.txt</text:p>
      <text:p text:style-name="Text_20_body">C:\Users\tineh\Desktop\djangoproject_new&gt;python -m pip install -r requirements.txt Collecting django&gt;=5.1 (from -r requirements.txt (line 1)) Downloading django-6.0.3-py3-none-any.whl.metadata (3.9 kB) Collecting asgiref&gt;=3.9.1 (from django&gt;=5.1-&gt;-r requirements.txt (line 1)) Using cached asgiref-3.11.1-py3-none-any.whl.metadata (9.3 kB) Collecting sqlparse&gt;=0.5.0 (from django&gt;=5.1-&gt;-r requirements.txt (line 1)) Using cached sqlparse-0.5.5-py3-none-any.whl.metadata (4.7 kB) Requirement already satisfied: tzdata in c:\users\tineh\appdata\local\programs\python\python313\lib\site-packages (from django&gt;=5.1-&gt;-r requirements.txt (line 1)) (2025.2) Downloading django-6.0.3-py3-none-any.whl (8.4 MB) ━━━━━━━━━━━━━━━━━━━━━━━━━━━━━━━━━━━━━━━━ 8.4/8.4 MB 22.3 MB/s eta 0:00:00 Using cached asgiref-3.11.1-py3-none-any.whl (24 kB) Using cached sqlparse-0.5.5-py3-none-any.whl (46 kB) Installing collected packages: sqlparse, asgiref, django Successfully installed asgiref-3.11.1 django-6.0.3 sqlparse-0.5.5</text:p>
      <text:p text:style-name="Text_20_body">[notice] A new release of pip is available: 25.1 -&gt; 26.0.1 [notice] To update, run: python.exe -m pip install --upgrade pip</text:p>
      <text:p text:style-name="Text_20_body">C:\Users\tineh\Desktop\djangoproject_new&gt;pip list Package <text:s text:c="8"/>Version</text:p>
      <text:p text:style-name="Horizontal_20_Line"/>
      <text:p text:style-name="Text_20_body">asgiref <text:s text:c="8"/>3.11.1 blinker <text:s text:c="8"/>1.9.0 click <text:s text:c="10"/>8.1.8 colorama <text:s text:c="7"/>0.4.6 Django <text:s text:c="9"/>6.0.3 Flask <text:s text:c="10"/>3.1.0 itsdangerous <text:s text:c="3"/>2.2.0 Jinja2 <text:s text:c="9"/>3.1.6 MarkupSafe <text:s text:c="5"/>3.0.2 numpy <text:s text:c="10"/>2.2.5 pandas <text:s text:c="9"/>2.2.3 pip <text:s text:c="12"/>25.1 python-dateutil 2.9.0.post0 pytz <text:s text:c="11"/>2025.2 six <text:s text:c="12"/>1.17.0 sqlparse <text:s text:c="7"/>0.5.5 tabulate <text:s text:c="7"/>0.9.0 tzdata <text:s text:c="9"/>2025.2 Werkzeug <text:s text:c="7"/>3.1.3</text:p>
      <text:p text:style-name="Text_20_body">C:\Users\tineh\Desktop\djangoproject_new&gt;django_new_env\Scripts\activate</text:p>
      <text:p text:style-name="Text_20_body">(django_new_env) C:\Users\tineh\Desktop\djangoproject_new&gt;pip list Package Version</text:p>
      <text:p text:style-name="Horizontal_20_Line"/>
      <text:p text:style-name="Text_20_body">pip <text:s text:c="4"/>25.0.1</text:p>
      <text:p text:style-name="Text_20_body">(django_new_env) C:\Users\tineh\Desktop\djangoproject_new&gt;python -m pip install -r requirements.txt Collecting django&gt;=5.1 (from -r requirements.txt (line 1)) Using cached django-6.0.3-py3-none-any.whl.metadata (3.9 kB) Collecting asgiref&gt;=3.9.1 (from django&gt;=5.1-&gt;-r <text:soft-page-break/>requirements.txt (line 1)) Using cached asgiref-3.11.1-py3-none-any.whl.metadata (9.3 kB) Collecting sqlparse&gt;=0.5.0 (from django&gt;=5.1-&gt;-r requirements.txt (line 1)) Using cached sqlparse-0.5.5-py3-none-any.whl.metadata (4.7 kB) Collecting tzdata (from django&gt;=5.1-&gt;-r requirements.txt (line 1)) Downloading tzdata-2025.3-py2.py3-none-any.whl.metadata (1.4 kB) Using cached django-6.0.3-py3-none-any.whl (8.4 MB) Using cached asgiref-3.11.1-py3-none-any.whl (24 kB) Using cached sqlparse-0.5.5-py3-none-any.whl (46 kB) Downloading tzdata-2025.3-py2.py3-none-any.whl (348 kB) Installing collected packages: tzdata, sqlparse, asgiref, django Successfully installed asgiref-3.11.1 django-6.0.3 sqlparse-0.5.5 tzdata-2025.3</text:p>
      <text:p text:style-name="Text_20_body">[notice] A new release of pip is available: 25.0.1 -&gt; 26.0.1 [notice] To update, run: python.exe -m pip install --upgrade pip</text:p>
      <text:p text:style-name="Text_20_body">(django_new_env) C:\Users\tineh\Desktop\djangoproject_new&gt;python.exe -m pip install --upgrade pip Requirement already satisfied: pip in c:\users\tineh\desktop\djangoproject_new\django_new_env\lib\site-packages (25.0.1) Collecting pip Using cached pip-26.0.1-py3-none-any.whl.metadata (4.7 kB) Using cached pip-26.0.1-py3-none-any.whl (1.8 MB) Installing collected packages: pip Attempting uninstall: pip Found existing installation: pip 25.0.1 Uninstalling pip-25.0.1: Successfully uninstalled pip-25.0.1 Successfully installed pip-26.0.1</text:p>
      <text:p text:style-name="Text_20_body">(django_new_env) C:\Users\tineh\Desktop\djangoproject_new&gt;deacivate 'deacivate' is not recognized as an internal or external command, operable program or batch file.</text:p>
      <text:p text:style-name="Text_20_body">(django_new_env) C:\Users\tineh\Desktop\djangoproject_new&gt;deactivate C:\Users\tineh\Desktop\djangoproject_new&gt;pip uninstall django Found existing installation: Django 6.0.3 Uninstalling Django-6.0.3: Would remove: c:\users\tineh\appdata\local\programs\python\python313\lib\site-packages\django-6.0.3.dist-info* c:\users\tineh\appdata\local\programs\python\python313\lib\site-packages\django* c:\users\tineh\appdata\local\programs\python\python313\scripts\django-admin.exe Proceed (Y/n)? y Successfully uninstalled Django-6.0.3</text:p>
      <text:p text:style-name="Text_20_body">C:\Users\tineh\Desktop\djangoproject_new&gt;django_new_env\Scripts\activate</text:p>
      <text:p text:style-name="Text_20_body">(django_new_env) C:\Users\tineh\Desktop\djangoproject_new&gt;django-admin --version 6.0.3</text:p>
      <text:p text:style-name="Text_20_body">(django_new_env) C:\Users\tineh\Desktop\djangoproject_new&gt;django-admin.exe startproject mysite_new</text:p>
      <text:p text:style-name="Text_20_body">(django_new_env) C:\Users\tineh\Desktop\djangoproject_new&gt;cd mysite_new</text:p>
      <text:p text:style-name="Text_20_body">(django_new_env) C:\Users\tineh\Desktop\djangoproject_new\mysite_new&gt;python manage.py migrate Operations to perform: Apply all migrations: admin, auth, contenttypes, sessions Running migrations: Applying contenttypes.0001_initial... OK Applying auth.0001_initial... OK Applying admin.0001_initial... OK Applying admin.0002_logentry_remove_auto_add... OK Applying admin.0003_logentry_add_action_flag_choices... OK Applying contenttypes.0002_remove_content_type_name... OK Applying auth.0002_alter_permission_name_max_length... OK Applying auth.0003_alter_user_email_max_length... OK Applying auth.0004_alter_user_username_opts... OK Applying auth.0005_alter_user_last_login_null... OK Applying auth.0006_require_contenttypes_0002... OK Applying auth.0007_alter_validators_add_error_messages... OK Applying <text:soft-page-break/>auth.0008_alter_user_username_max_length... OK Applying auth.0009_alter_user_last_name_max_length... OK Applying auth.0010_alter_group_name_max_length... OK Applying auth.0011_update_proxy_permissions... OK Applying auth.0012_alter_user_first_name_max_length... OK Applying sessions.0001_initial... OK</text:p>
      <text:p text:style-name="Text_20_body">(django_new_env) C:\Users\tineh\Desktop\djangoproject_new\mysite_new&gt;python manage.py runserver Watching for file changes with StatReloader Performing system checks...</text:p>
      <text:p text:style-name="Text_20_body">System check identified no issues (0 silenced). March 21, 2026 - 21:17:02 Django version 6.0.3, using settings 'mysite_new.settings' Starting development server at http://127.0.0.1:8000/ Quit the server with CTRL-BREAK.</text:p>
      <text:p text:style-name="Text_20_body">WARNING: This is a development server. Do not use it in a production setting. Use a production WSGI or ASGI server instead. For more information on production servers see: <text:a xlink:type="simple" xlink:href="https://docs.djangoproject.com/en/6.0/howto/deployment/" text:style-name="Internet_20_link" text:visited-style-name="Visited_20_Internet_20_Link">https://docs.djangoproject.com/en/6.0/howto/deployment/</text:a> [21/Mar/2026 21:22:04] "GET / HTTP/1.1" 200 12089 Not Found: /favicon.ico [21/Mar/2026 21:22:05] "GET /favicon.ico HTTP/1.1" 404 2212</text:p>
      <text:p text:style-name="Text_20_body">(django_new_env) C:\Users\tineh\Desktop\djangoproject_new\mysite_new&gt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1T21:43:24.510242200</meta:creation-date>
    <dc:date>2026-03-21T21:43:58.395857600</dc:date>
    <meta:editing-duration>PT34S</meta:editing-duration>
    <meta:editing-cycles>1</meta:editing-cycles>
    <meta:document-statistic meta:table-count="0" meta:image-count="0" meta:object-count="0" meta:page-count="3" meta:paragraph-count="29" meta:word-count="568" meta:character-count="7038" meta:non-whitespace-character-count="6338"/>
    <meta:generator>LibreOffice/26.2.1.2$Windows_X86_64 LibreOffice_project/620$Build-2</meta:generator>
  </office:meta>
</office:document-meta>
</file>